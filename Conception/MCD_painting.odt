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oici toutes les associations avec leurs cardinalités :</text:p>
      <text:p text:style-name="Horizontal_20_Line"/>
      <text:p text:style-name="Text_20_body"><text:span text:style-name="Strong_20_Emphasis">1. valide</text:span> <text:span text:style-name="Source_20_Text">UTILISATEUR</text:span> (0,N) — <text:span text:style-name="Strong_20_Emphasis">valide</text:span> — (0,1) <text:span text:style-name="Source_20_Text">UTILISATEUR</text:span> <text:span text:style-name="Emphasis">(auto-référence : un admin peut valider plusieurs utilisateurs, un utilisateur est validé par au plus un autre)</text:span></text:p>
      <text:p text:style-name="Horizontal_20_Line"/>
      <text:p text:style-name="Text_20_body"><text:span text:style-name="Strong_20_Emphasis">2. rédige</text:span> <text:span text:style-name="Source_20_Text">UTILISATEUR</text:span> (1,1) — <text:span text:style-name="Strong_20_Emphasis">rédige</text:span> — (0,N) <text:span text:style-name="Source_20_Text">FICHE_PEINTURE</text:span> <text:span text:style-name="Emphasis">(un utilisateur rédige plusieurs fiches, une fiche est rédigée par exactement un utilisateur)</text:span></text:p>
      <text:p text:style-name="Horizontal_20_Line"/>
      <text:p text:style-name="Text_20_body"><text:span text:style-name="Strong_20_Emphasis">3. crée</text:span> <text:span text:style-name="Source_20_Text">UTILISATEUR</text:span> (1,1) — <text:span text:style-name="Strong_20_Emphasis">crée</text:span> — (0,N) <text:span text:style-name="Source_20_Text">ROADMAP</text:span> <text:span text:style-name="Emphasis">(un utilisateur crée plusieurs roadmaps, une roadmap est créée par exactement un utilisateur)</text:span></text:p>
      <text:p text:style-name="Horizontal_20_Line"/>
      <text:p text:style-name="Text_20_body"><text:span text:style-name="Strong_20_Emphasis">4. uploade</text:span> <text:span text:style-name="Source_20_Text">UTILISATEUR</text:span> (1,1) — <text:span text:style-name="Strong_20_Emphasis">uploade</text:span> — (0,N) <text:span text:style-name="Source_20_Text">MEDIA</text:span> <text:span text:style-name="Emphasis">(un utilisateur uploade plusieurs médias, un média est uploadé par exactement un utilisateur)</text:span></text:p>
      <text:p text:style-name="Horizontal_20_Line"/>
      <text:p text:style-name="Text_20_body"><text:span text:style-name="Strong_20_Emphasis">5. génère</text:span> <text:span text:style-name="Source_20_Text">UTILISATEUR</text:span> (1,1) — <text:span text:style-name="Strong_20_Emphasis">génère</text:span> — (0,N) <text:span text:style-name="Source_20_Text">AUDIT_LOG</text:span> <text:span text:style-name="Emphasis">(un utilisateur génère plusieurs logs, un log est généré par exactement un utilisateur)</text:span></text:p>
      <text:p text:style-name="Horizontal_20_Line"/>
      <text:p text:style-name="Text_20_body"><text:span text:style-name="Strong_20_Emphasis">6. classifie</text:span> <text:span text:style-name="Source_20_Text">CATEGORIE_PEINTURE</text:span> (1,1) — <text:span text:style-name="Strong_20_Emphasis">classifie</text:span> — (0,N) <text:span text:style-name="Source_20_Text">FICHE_PEINTURE</text:span> <text:span text:style-name="Emphasis">(une catégorie classifie plusieurs fiches, une fiche appartient à exactement une catégorie)</text:span></text:p>
      <text:p text:style-name="Horizontal_20_Line"/>
      <text:p text:style-name="Text_20_body"><text:span text:style-name="Strong_20_Emphasis">7. organise</text:span> <text:span text:style-name="Source_20_Text">CATEGORIE_PEINTURE</text:span> (1,1) — <text:span text:style-name="Strong_20_Emphasis">organise</text:span> — (0,N) <text:span text:style-name="Source_20_Text">ROADMAP</text:span> <text:span text:style-name="Emphasis">(une catégorie organise plusieurs roadmaps, une roadmap appartient à exactement une catégorie)</text:span></text:p>
      <text:p text:style-name="Horizontal_20_Line"/>
      <text:p text:style-name="Text_20_body"><text:span text:style-name="Strong_20_Emphasis">8. contient</text:span> <text:span text:style-name="Source_20_Text">CATEGORIE_PEINTURE</text:span> (0,1) — <text:span text:style-name="Strong_20_Emphasis">contient</text:span> — (0,N) <text:span text:style-name="Source_20_Text">CATEGORIE_PEINTURE</text:span> <text:span text:style-name="Emphasis">(auto-référence hiérarchique : une catégorie peut contenir plusieurs sous-catégories, une catégorie a au plus une catégorie parente)</text:span></text:p>
      <text:p text:style-name="Horizontal_20_Line"/>
      <text:p text:style-name="Text_20_body"><text:span text:style-name="Strong_20_Emphasis">9. illustrée_par</text:span> <text:span text:style-name="Source_20_Text">FICHE_PEINTURE</text:span> (0,N) — <text:span text:style-name="Strong_20_Emphasis">illustrée_par</text:span> — (0,N) <text:span text:style-name="Source_20_Text">MEDIA</text:span> <text:span text:style-name="Emphasis">(une fiche peut avoir plusieurs médias, un média peut illustrer plusieurs fiches)</text:span></text:p>
      <text:p text:style-name="Horizontal_20_Line"/>
      <text:p text:style-name="Text_20_body"><text:span text:style-name="Strong_20_Emphasis">10. utilise</text:span> <text:span text:style-name="Source_20_Text">FICHE_PEINTURE</text:span> (0,N) — <text:span text:style-name="Strong_20_Emphasis">utilise</text:span> — (0,N) <text:span text:style-name="Source_20_Text">TECHNIQUE</text:span> <text:span text:style-name="Emphasis">(une fiche peut utiliser plusieurs techniques, une technique peut apparaître dans plusieurs fiches)</text:span></text:p>
      <text:p text:style-name="Horizontal_20_Line"/>
      <text:p text:style-name="Text_20_body"><text:span text:style-name="Strong_20_Emphasis">11. nécessite</text:span> <text:span text:style-name="Source_20_Text">FICHE_PEINTURE</text:span> (0,N) — <text:span text:style-name="Strong_20_Emphasis">nécessite</text:span> — (0,N) <text:span text:style-name="Source_20_Text">MATERIAU</text:span> <text:span text:style-name="Emphasis">(une fiche peut nécessiter plusieurs matériaux, un matériau peut apparaître dans plusieurs fiches)</text:span></text:p>
      <text:p text:style-name="Horizontal_20_Line"/>
      <text:p text:style-name="Text_20_body"><text:soft-page-break/><text:span text:style-name="Strong_20_Emphasis">12. étiquetée_par</text:span> <text:span text:style-name="Source_20_Text">FICHE_PEINTURE</text:span> (0,N) — <text:span text:style-name="Strong_20_Emphasis">étiquetée_par</text:span> — (0,N) <text:span text:style-name="Source_20_Text">TAG</text:span> <text:span text:style-name="Emphasis">(une fiche peut avoir plusieurs tags, un tag peut être associé à plusieurs fiches)</text:span></text:p>
      <text:p text:style-name="Horizontal_20_Line"/>
      <text:p text:style-name="Text_20_body"><text:span text:style-name="Strong_20_Emphasis">13. composée_de</text:span> <text:span text:style-name="Emphasis">(attribut d'association : ordre)</text:span> <text:span text:style-name="Source_20_Text">ROADMAP</text:span> (0,N) — <text:span text:style-name="Strong_20_Emphasis">composée_de</text:span> — (0,N) <text:span text:style-name="Source_20_Text">FICHE_PEINTURE</text:span> <text:span text:style-name="Emphasis">(une roadmap est composée de plusieurs fiches ordonnées, une fiche peut apparaître dans plusieurs roadmaps)</text:span></text:p>
      <text:p text:style-name="Horizontal_20_Line"/>
      <text:p text:style-name="Text_20_body"><text:span text:style-name="Strong_20_Emphasis">Total : 13 associations — 5 binaires simples, 4 N:N, 2 auto-références, 2 avec catégori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15:57:29.958928761</meta:creation-date>
    <dc:date>2026-04-18T15:58:13.064453601</dc:date>
    <meta:editing-duration>PT44S</meta:editing-duration>
    <meta:editing-cycles>1</meta:editing-cycles>
    <meta:document-statistic meta:table-count="0" meta:image-count="0" meta:object-count="0" meta:page-count="2" meta:paragraph-count="15" meta:word-count="294" meta:character-count="2250" meta:non-whitespace-character-count="1944"/>
    <meta:generator>LibreOffice/7.3.7.2$Linux_X86_64 LibreOffice_project/30$Build-2</meta:generator>
  </office:meta>
</office:document-meta>
</file>