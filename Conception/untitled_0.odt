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4"/>
    <style:style style:name="P2" style:family="paragraph" style:parent-style-name="Text_20_body" style:list-style-name="L4">
      <style:paragraph-properties fo:margin-top="0cm" fo:margin-bottom="0cm" style:contextual-spacing="false"/>
    </style:style>
    <style:style style:name="P3" style:family="paragraph" style:parent-style-name="Text_20_body" style:list-style-name="L5"/>
    <style:style style:name="P4" style:family="paragraph" style:parent-style-name="Text_20_body" style:list-style-name="L5">
      <style:paragraph-properties fo:margin-top="0cm" fo:margin-bottom="0cm" style:contextual-spacing="false"/>
    </style:style>
    <style:style style:name="P5" style:family="paragraph" style:parent-style-name="Text_20_body" style:list-style-name="L6"/>
    <style:style style:name="P6" style:family="paragraph" style:parent-style-name="Text_20_body" style:list-style-name="L6">
      <style:paragraph-properties fo:margin-top="0cm" fo:margin-bottom="0cm" style:contextual-spacing="false"/>
    </style:style>
    <style:style style:name="P7" style:family="paragraph" style:parent-style-name="Text_20_body" style:list-style-name="L7"/>
    <style:style style:name="P8" style:family="paragraph" style:parent-style-name="Text_20_body" style:list-style-name="L7">
      <style:paragraph-properties fo:margin-top="0cm" fo:margin-bottom="0cm" style:contextual-spacing="false"/>
    </style:style>
    <style:style style:name="P9" style:family="paragraph" style:parent-style-name="Text_20_body" style:list-style-name="L8"/>
    <style:style style:name="P10" style:family="paragraph" style:parent-style-name="Text_20_body" style:list-style-name="L8">
      <style:paragraph-properties fo:margin-top="0cm" fo:margin-bottom="0cm" style:contextual-spacing="false"/>
    </style:style>
    <style:style style:name="P11" style:family="paragraph" style:parent-style-name="Text_20_body" style:list-style-name="L9"/>
    <style:style style:name="P12" style:family="paragraph" style:parent-style-name="Text_20_body" style:list-style-name="L9">
      <style:paragraph-properties fo:margin-top="0cm" fo:margin-bottom="0cm" style:contextual-spacing="false"/>
    </style:style>
    <style:style style:name="P13" style:family="paragraph" style:parent-style-name="Text_20_body">
      <style:text-properties officeooo:paragraph-rsid="001c42b3"/>
    </style:style>
    <style:style style:name="P14" style:family="paragraph" style:parent-style-name="Text_20_body">
      <style:text-properties fo:font-size="16pt" fo:font-weight="bold" officeooo:paragraph-rsid="001c42b3" style:font-size-asian="16pt" style:font-weight-asian="bold" style:font-size-complex="16pt" style:font-weight-complex="bold"/>
    </style:style>
    <style:style style:name="T1" style:family="text">
      <style:text-properties officeooo:rsid="001d23c6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officeooo:rsid="001d23c6" style:font-size-asian="16pt" style:font-size-complex="16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/>1 – Coordination &amp; rédaction(Ps)</text:p>
      <text:p text:style-name="P13"><text:tab/>Coordination générale + rédaction finale du cahier des charges</text:p>
      <text:list xml:id="list2868215225" text:style-name="L4">
        <text:list-item>
          <text:p text:style-name="P2">Planifier et coordonner le travail de toute l'équipe pour la Phase 1 </text:p>
        </text:list-item>
        <text:list-item>
          <text:p text:style-name="P2">Rechercher et documenter le fonctionnement réel du métier de peintre : comment devient-on peintre, quelles sont les étapes du métier, quels types de peinture existe-t-il (artistique, bâtiment, décoration…) </text:p>
        </text:list-item>
        <text:list-item>
          <text:p text:style-name="P2">Rédiger la section "Contexte &amp; Problématique" du cahier des charges : pourquoi cette plateforme, quel besoin elle répond </text:p>
        </text:list-item>
        <text:list-item>
          <text:p text:style-name="P2">Assembler toutes les sections rédigées par les autres membres en un document cohérent, structuré et propre </text:p>
        </text:list-item>
        <text:list-item>
          <text:p text:style-name="P1">Relire et valider l'ensemble du cahier des charges avant envoi au prof </text:p>
        </text:list-item>
      </text:list>
      <text:p text:style-name="Horizontal_20_Line"/>
      <text:p text:style-name="Text_20_body"><text:span text:style-name="Strong_20_Emphasis"><text:span text:style-name="T2">2 – Mapping réseau ↔ métier Painting(Cesare)</text:span></text:span></text:p>
      <text:list xml:id="list11281697" text:style-name="L5">
        <text:list-item>
          <text:p text:style-name="P4">Identifier formellement qui est l'émetteur, qui est le récepteur, quel est le canal dans le contexte Painting Business Core </text:p>
        </text:list-item>
        <text:list-item>
          <text:p text:style-name="P4">Définir le "protocole métier" : les règles qui gouvernent qui peut publier, comment, dans quel format </text:p>
        </text:list-item>
        <text:list-item>
          <text:p text:style-name="P4">Lister les "messages échangés" sur la plateforme : fiche métier, compétence, ressource, illustration </text:p>
        </text:list-item>
        <text:list-item>
          <text:p text:style-name="P3">Rédiger la section "Analogie réseau → Painting Business Core" du cahier des charges </text:p>
        </text:list-item>
      </text:list>
      <text:p text:style-name="Horizontal_20_Line"/>
      <text:p text:style-name="Text_20_body"><text:span text:style-name="Strong_20_Emphasis"><text:span text:style-name="T2">3 – Acteurs &amp; besoins fonctionnels(Tchassem)</text:span></text:span></text:p>
      <text:list xml:id="list4273580650" text:style-name="L6">
        <text:list-item>
          <text:p text:style-name="P6">Identifier et décrire les 3 acteurs : Visiteur (anonyme), Peintre (contributeur), Administrateur </text:p>
        </text:list-item>
        <text:list-item>
          <text:p text:style-name="P6">Définir le rôle, les droits et les actions possibles de chaque acteur </text:p>
        </text:list-item>
        <text:list-item>
          <text:p text:style-name="P6">Lister tous les besoins fonctionnels : consultation libre, recherche full-text, publication de fiches, gestion des catégories, upload d'images/vidéos, validation de comptes peintres par l'admin </text:p>
        </text:list-item>
        <text:list-item>
          <text:p text:style-name="P5">Rédiger les sections "Acteurs" et "Besoins fonctionnels" du cahier des charges </text:p>
        </text:list-item>
      </text:list>
      <text:p text:style-name="Horizontal_20_Line"/>
      <text:p text:style-name="Text_20_body"><text:span text:style-name="Strong_20_Emphasis"><text:span text:style-name="T2">4 – Besoins non fonctionnels &amp; contraintes techniques(Abel)</text:span></text:span></text:p>
      <text:list xml:id="list818451952" text:style-name="L7">
        <text:list-item>
          <text:p text:style-name="P8">Documenter les contraintes techniques retenues : Next.js SSR, Spring Boot, PostgreSQL, Redis, MinIO, Docker, GitLab </text:p>
        </text:list-item>
        <text:list-item>
          <text:p text:style-name="P8">Préciser ce qui a été retiré de la stack initiale et pourquoi : pas de Kafka, pas de WebFlux, pas de React Native, pas de multi-tenant </text:p>
        </text:list-item>
        <text:list-item>
          <text:p text:style-name="P8">Décrire les exigences de qualité : SEO (site indexable par Google), PWA (lecture offline), internationalisation i18n, sécurité JWT/OAuth2 </text:p>
        </text:list-item>
        <text:list-item>
          <text:p text:style-name="P7">Rédiger la section "Besoins non fonctionnels &amp; Contraintes techniques" du cahier des charges </text:p>
        </text:list-item>
      </text:list>
      <text:p text:style-name="Horizontal_20_Line"/>
      <text:p text:style-name="Text_20_body"><text:soft-page-break/><text:span text:style-name="Strong_20_Emphasis"><text:span text:style-name="T2">5 — Périmètre &amp; catalogue de contenu (</text:span></text:span><text:span text:style-name="Strong_20_Emphasis"><text:span text:style-name="T3">Vichy</text:span></text:span><text:span text:style-name="Strong_20_Emphasis"><text:span text:style-name="T2">)</text:span></text:span></text:p>
      <text:list xml:id="list1159897850" text:style-name="L8">
        <text:list-item>
          <text:p text:style-name="P10">Définir clairement ce qui est dans le scope : information sur le métier, compétences, outils, formations, types de peinture, ressources </text:p>
        </text:list-item>
        <text:list-item>
          <text:p text:style-name="P10">Définir clairement ce qui est hors scope : ventes, devis, commandes, gestion de chantier, facturation (Business Object) </text:p>
        </text:list-item>
        <text:list-item>
          <text:p text:style-name="P10">Lister le catalogue de contenu que la plateforme devra héberger : types de fiches, catégories, tags possibles </text:p>
        </text:list-item>
        <text:list-item>
          <text:p text:style-name="P9">Rédiger la section "Périmètre du projet &amp; Catalogue de contenu" du cahier des charges </text:p>
        </text:list-item>
      </text:list>
      <text:p text:style-name="Horizontal_20_Line"/>
      <text:p text:style-name="Text_20_body"><text:span text:style-name="Strong_20_Emphasis"><text:span text:style-name="T2">6 — Étude de l'existant (</text:span></text:span><text:span text:style-name="Strong_20_Emphasis"><text:span text:style-name="T3">Djokam</text:span></text:span><text:span text:style-name="Strong_20_Emphasis"><text:span text:style-name="T2">)</text:span></text:span></text:p>
      <text:list xml:id="list1171031088" text:style-name="L9">
        <text:list-item>
          <text:p text:style-name="P12">Analyser 2 à 3 plateformes similaires : roadmap.sh (référence principale donnée par le prof), Wikipédia métiers, tout site d'information sur un métier </text:p>
        </text:list-item>
        <text:list-item>
          <text:p text:style-name="P12">Relever leurs fonctionnalités clés et identifier ce que notre plateforme apportera de différent ou de mieux </text:p>
        </text:list-item>
        <text:list-item>
          <text:p text:style-name="P11">Rédiger la section "Étude de l'existant" du cahier des charges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5T13:37:18.152415165</meta:creation-date>
    <dc:date>2026-03-25T20:24:39.400239278</dc:date>
    <meta:editing-duration>PT1M53S</meta:editing-duration>
    <meta:editing-cycles>1</meta:editing-cycles>
    <meta:document-statistic meta:table-count="0" meta:image-count="0" meta:object-count="0" meta:page-count="2" meta:paragraph-count="31" meta:word-count="461" meta:character-count="3023" meta:non-whitespace-character-count="2586"/>
    <meta:generator>LibreOffice/7.3.7.2$Linux_X86_64 LibreOffice_project/30$Build-2</meta:generator>
  </office:meta>
</office:document-meta>
</file>