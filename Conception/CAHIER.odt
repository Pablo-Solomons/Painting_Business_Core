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paragraph-properties fo:text-align="center" style:justify-single-word="false"/>
      <style:text-properties officeooo:rsid="0016af3a" officeooo:paragraph-rsid="0016af3a"/>
    </style:style>
    <style:style style:name="P8" style:family="paragraph" style:parent-style-name="Text_20_body">
      <style:paragraph-properties fo:text-align="center" style:justify-single-word="false"/>
      <style:text-properties fo:font-size="15pt" fo:font-weight="bold" officeooo:rsid="0016af3a" officeooo:paragraph-rsid="0016af3a" style:font-size-asian="15pt" style:font-weight-asian="bold" style:font-size-complex="15pt" style:font-weight-complex="bold"/>
    </style:style>
    <style:style style:name="T1" style:family="text">
      <style:text-properties officeooo:rsid="0015705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Répartition des taches du projet de Réseau</text:span><text:line-break/></text:p>
      <text:h text:style-name="Heading_20_2" text:outline-level="2"><text:span text:style-name="T1">Tache</text:span> 1 – Coordination &amp; rédaction<text:span text:style-name="T1">(Ps)</text:span></text:h>
      <text:list xml:id="list1367389787" text:style-name="L1">
        <text:list-item>
          <text:p text:style-name="P1">Coordonner et planifier le travail de l'équipe pour la Phase 1</text:p>
        </text:list-item>
        <text:list-item>
          <text:p text:style-name="P1">Rechercher et documenter le fonctionnement réel du métier de peintre (processus complet : prospection → chantier → facturation)</text:p>
        </text:list-item>
        <text:list-item>
          <text:p text:style-name="P1">Rédiger la section "Contexte &amp; Problématique" du cahier des charges</text:p>
        </text:list-item>
        <text:list-item>
          <text:p text:style-name="P1">Assembler et mettre en forme le document final (cohérence, structure, mise en page)</text:p>
        </text:list-item>
        <text:list-item>
          <text:p text:style-name="P1">Relire et valider l'ensemble du cahier des charges avant remise</text:p>
        </text:list-item>
      </text:list>
      <text:p text:style-name="Horizontal_20_Line"/>
      <text:h text:style-name="Heading_20_2" text:outline-level="2"><text:span text:style-name="T1">Tache</text:span> 2 – Mapping réseau ↔ métier Painting<text:span text:style-name="T1">(Cesare)</text:span></text:h>
      <text:list xml:id="list3843580628" text:style-name="L2">
        <text:list-item>
          <text:p text:style-name="P2">Identifier formellement l'émetteur (CdS) et le récepteur (FdS) dans le contexte Painting Business</text:p>
        </text:list-item>
        <text:list-item>
          <text:p text:style-name="P2">Définir le "protocole métier" : règles qui gouvernent la relation client/peintre</text:p>
        </text:list-item>
        <text:list-item>
          <text:p text:style-name="P2">Lister les "messages échangés" : devis, bon de commande, rapport de chantier, facture</text:p>
        </text:list-item>
        <text:list-item>
          <text:p text:style-name="P2">Rédiger la section "Mapping réseau → Painting" du cahier des charges</text:p>
        </text:list-item>
      </text:list>
      <text:p text:style-name="Horizontal_20_Line"/>
      <text:h text:style-name="Heading_20_2" text:outline-level="2"><text:span text:style-name="T1">Tache</text:span> 3 – Acteurs &amp; besoins fonctionnels<text:span text:style-name="T1">(Tchassem)</text:span></text:h>
      <text:list xml:id="list2445130115" text:style-name="L3">
        <text:list-item>
          <text:p text:style-name="P3">Identifier et décrire tous les acteurs : Client, Peintre, Entreprise de peinture, Admin</text:p>
        </text:list-item>
        <text:list-item>
          <text:p text:style-name="P3">Définir le rôle, les droits et les responsabilités de chaque acteur</text:p>
        </text:list-item>
        <text:list-item>
          <text:p text:style-name="P3">Lister les besoins fonctionnels (inscription, recherche, devis, suivi chantier, facturation, notation…)</text:p>
        </text:list-item>
        <text:list-item>
          <text:p text:style-name="P3">Rédiger les sections "Acteurs" et "Besoins fonctionnels" du cahier des charges</text:p>
        </text:list-item>
      </text:list>
      <text:p text:style-name="Horizontal_20_Line"/>
      <text:h text:style-name="Heading_20_2" text:outline-level="2"><text:span text:style-name="T1">Tache</text:span> 4 – Besoins non fonctionnels &amp; contraintes techniques<text:span text:style-name="T1">(Abel)</text:span></text:h>
      <text:list xml:id="list477355529" text:style-name="L4">
        <text:list-item>
          <text:p text:style-name="P4">Documenter toutes les contraintes techniques imposées (stack, PWA, offline-first, multi-tenant…)</text:p>
        </text:list-item>
        <text:list-item>
          <text:p text:style-name="P4">Détailler les exigences de sécurité : OAuth2, JWT, 2FA, rôles et permissions</text:p>
        </text:list-item>
        <text:list-item>
          <text:p text:style-name="P4">Définir les exigences de performance : temps réel, scalabilité, support multi-devises</text:p>
        </text:list-item>
        <text:list-item>
          <text:p text:style-name="P4">Rédiger la section "Besoins non fonctionnels &amp; Contraintes" du cahier des charges</text:p>
        </text:list-item>
      </text:list>
      <text:p text:style-name="Horizontal_20_Line"><text:soft-page-break/></text:p>
      <text:h text:style-name="Heading_20_2" text:outline-level="2">Membre 5 – Périmètre, livrables &amp; catalogue de services<text:span text:style-name="T1">(Vichy)</text:span></text:h>
      <text:list xml:id="list2317867676" text:style-name="L5">
        <text:list-item>
          <text:p text:style-name="P5">Définir le périmètre du projet : ce qui est dans le scope vs hors scope pour ce semestre</text:p>
        </text:list-item>
        <text:list-item>
          <text:p text:style-name="P5">Lister le catalogue de services offerts par la plateforme (ServicesCatalogue)</text:p>
        </text:list-item>
        <text:list-item>
          <text:p text:style-name="P5">Identifier les ressources nécessaires (matériaux, équipements, main d'œuvre) comme Business Resources</text:p>
        </text:list-item>
        <text:list-item>
          <text:p text:style-name="P5">Rédiger la section "Périmètre &amp; Catalogue de services" du cahier des charges</text:p>
        </text:list-item>
      </text:list>
      <text:p text:style-name="Horizontal_20_Line"/>
      <text:h text:style-name="Heading_20_2" text:outline-level="2">Membre 6 – Recherche terrain &amp; benchmark<text:span text:style-name="T1">(Djokam)</text:span></text:h>
      <text:list xml:id="list3631852617" text:style-name="L6">
        <text:list-item>
          <text:p text:style-name="P6">Faire un benchmark de 2–3 plateformes similaires existantes (ex : Habitissimo, MesDépanneurs…)</text:p>
        </text:list-item>
        <text:list-item>
          <text:p text:style-name="P6">Résumer les fonctionnalités clés observées et ce que notre plateforme apportera en plus</text:p>
        </text:list-item>
        <text:list-item>
          <text:p text:style-name="P6">Rédiger la section "Étude de l'existant" du cahier des charges</text:p>
        </text:list-item>
      </text:list>
      <text:p text:style-name="Horizontal_20_Line"/>
      <text:p text:style-name="P8">NB:À remettre au plus tard la semaine prochai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08:53:31.513799962</meta:creation-date>
    <dc:date>2026-03-19T11:21:13.724645498</dc:date>
    <meta:editing-duration>P1DT2H7M21S</meta:editing-duration>
    <meta:editing-cycles>1</meta:editing-cycles>
    <meta:document-statistic meta:table-count="0" meta:image-count="0" meta:object-count="0" meta:page-count="2" meta:paragraph-count="32" meta:word-count="367" meta:character-count="2417" meta:non-whitespace-character-count="2100"/>
    <meta:generator>LibreOffice/7.3.7.2$Linux_X86_64 LibreOffice_project/30$Build-2</meta:generator>
  </office:meta>
</office:document-meta>
</file>